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5cm" fo:min-width="0.915cm"/>
      <style:paragraph-properties style:writing-mode="lr-tb"/>
    </style:style>
    <style:style style:name="gr3" style:family="graphic" style:parent-style-name="standard">
      <style:graphic-properties draw:fill="solid" draw:fill-color="#ffbf00" draw:textarea-horizontal-align="justify" draw:textarea-vertical-align="middle" draw:auto-grow-height="false" fo:min-height="0.75cm" fo:min-width="0.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cm" svg:height="2cm" svg:x="2cm" svg:y="12.2cm">
          <text:p text:style-name="P1">p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999cm" svg:height="1.999cm" svg:x="12.012cm" svg:y="9.161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998cm" svg:height="1.998cm" svg:x="12.002cm" svg:y="15.202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cm" svg:height="2cm" svg:x="17.1cm" svg:y="9.161cm">
          <text:p text:style-name="P1">fd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2cm" svg:height="2cm" svg:x="17cm" svg:y="15.2cm">
          <text:p text:style-name="P1">fd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2cm" svg:height="2cm" svg:x="6.801cm" svg:y="9.161cm">
          <text:p text:style-name="P1">pipe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2cm" svg:height="2cm" svg:x="7.002cm" svg:y="15.202cm">
          <text:p text:style-name="P1">pipe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2.012cm" svg:y1="10.161cm" svg:x2="8.801cm" svg:y2="10.161cm" draw:start-shape="id1" draw:start-glue-point="6" draw:end-shape="id2" draw:end-glue-point="7" svg:d="M12012 10161h-3211" svg:viewBox="0 0 3212 1">
          <text:p text:style-name="P1">write()</text:p>
        </draw:connector>
        <draw:connector draw:style-name="gr4" draw:text-style-name="P3" draw:layer="layout" svg:x1="12.002cm" svg:y1="16.201cm" svg:x2="9.002cm" svg:y2="16.202cm" draw:start-shape="id3" draw:start-glue-point="6" draw:end-shape="id4" draw:end-glue-point="7" svg:d="M12002 16201h-1499v1h-1501" svg:viewBox="0 0 3001 2">
          <text:p text:style-name="P1">write()</text:p>
        </draw:connector>
        <draw:connector draw:style-name="gr4" draw:text-style-name="P3" draw:layer="layout" svg:x1="17.1cm" svg:y1="10.161cm" svg:x2="14.011cm" svg:y2="10.161cm" draw:start-shape="id5" draw:start-glue-point="5" draw:end-shape="id1" draw:end-glue-point="10" svg:d="M17100 10161h-3089" svg:viewBox="0 0 3090 1">
          <text:p text:style-name="P1">read()</text:p>
        </draw:connector>
        <draw:connector draw:style-name="gr4" draw:text-style-name="P3" draw:layer="layout" svg:x1="17cm" svg:y1="16.2cm" svg:x2="14cm" svg:y2="16.201cm" draw:start-shape="id6" draw:start-glue-point="5" draw:end-shape="id3" draw:end-glue-point="10" svg:d="M17000 16200h-1499v1h-1501" svg:viewBox="0 0 3001 2">
          <text:p text:style-name="P1">read()</text:p>
        </draw:connector>
        <draw:connector draw:style-name="gr5" draw:text-style-name="P3" draw:layer="layout" draw:type="line" svg:x1="6.801cm" svg:y1="10.161cm" svg:x2="3.707cm" svg:y2="12.493cm" draw:start-shape="id2" draw:start-glue-point="5" draw:end-shape="id7" draw:end-glue-point="11" svg:d="M6801 10161l-3094 2332" svg:viewBox="0 0 3095 2333">
          <text:p text:style-name="P1">read()</text:p>
        </draw:connector>
        <draw:connector draw:style-name="gr5" draw:text-style-name="P3" draw:layer="layout" draw:type="line" svg:x1="7.002cm" svg:y1="16.202cm" svg:x2="3.707cm" svg:y2="13.907cm" draw:start-shape="id4" draw:start-glue-point="5" draw:end-shape="id7" draw:end-glue-point="9" svg:d="M7002 16202l-3295-2295" svg:viewBox="0 0 3296 2296">
          <text:p text:style-name="P1">read()</text:p>
        </draw:connector>
        <draw:connector draw:style-name="gr5" draw:text-style-name="P3" draw:layer="layout" draw:type="line" svg:x1="12.304cm" svg:y1="10.868cm" svg:x2="4cm" svg:y2="13.2cm" draw:start-shape="id1" draw:start-glue-point="7" draw:end-shape="id7" draw:end-glue-point="10" svg:d="M12304 10868l-8304 2332" svg:viewBox="0 0 8305 2333">
          <text:p text:style-name="P1">wait()</text:p>
        </draw:connector>
        <draw:connector draw:style-name="gr5" draw:text-style-name="P3" draw:layer="layout" draw:type="line" svg:x1="12.294cm" svg:y1="15.494cm" svg:x2="4cm" svg:y2="13.2cm" draw:start-shape="id3" draw:start-glue-point="5" draw:end-shape="id7" draw:end-glue-point="10" svg:d="M12294 15494l-8294-2294" svg:viewBox="0 0 8295 2295">
          <text:p text:style-name="P1">wait()</text:p>
        </draw:connector>
        <draw:custom-shape draw:style-name="gr1" draw:text-style-name="P1" xml:id="id9" draw:id="id9" draw:layer="layout" svg:width="2cm" svg:height="2cm" svg:x="8cm" svg:y="3cm">
          <text:p text:style-name="P1">p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2cm" svg:height="2cm" svg:x="13.001cm" svg:y="0.962cm">
          <text:p text:style-name="P1">fd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0" draw:id="id10" draw:layer="layout" svg:width="2cm" svg:height="2cm" svg:x="13.001cm" svg:y="5.001cm">
          <text:p text:style-name="P1">fd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3.001cm" svg:y1="1.962cm" svg:x2="9.707cm" svg:y2="3.293cm" draw:start-shape="id8" draw:start-glue-point="5" draw:end-shape="id9" draw:end-glue-point="11" svg:d="M13001 1962l-3294 1331" svg:viewBox="0 0 3295 1332">
          <text:p text:style-name="P1">read()</text:p>
        </draw:connector>
        <draw:connector draw:style-name="gr6" draw:text-style-name="P3" draw:layer="layout" draw:type="line" svg:x1="13.001cm" svg:y1="6.001cm" svg:x2="9.707cm" svg:y2="4.707cm" draw:start-shape="id10" draw:start-glue-point="5" draw:end-shape="id9" draw:end-glue-point="9" svg:d="M13001 6001l-3294-1294" svg:viewBox="0 0 3295 1295">
          <text:p text:style-name="P1">read()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23T15:59:41.883199630</meta:creation-date>
    <dc:date>2020-03-23T16:16:40.091000989</dc:date>
    <meta:editing-duration>PT14M6S</meta:editing-duration>
    <meta:editing-cycles>2</meta:editing-cycles>
    <meta:generator>LibreOffice/6.3.5.2$Linux_X86_64 LibreOffice_project/30$Build-2</meta:generator>
    <meta:document-statistic meta:object-count="20"/>
  </office:meta>
</office:document-meta>
</file>